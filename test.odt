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07D9949E9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3de" officeooo:paragraph-rsid="0016d3de"/>
    </style:style>
    <style:style style:name="P2" style:family="paragraph" style:parent-style-name="Standard">
      <style:text-properties fo:font-weight="bold" officeooo:rsid="00200a00" officeooo:paragraph-rsid="00200a00" style:font-weight-asian="bold" style:font-weight-complex="bold"/>
    </style:style>
    <style:style style:name="P3" style:family="paragraph" style:parent-style-name="Standard">
      <style:text-properties officeooo:paragraph-rsid="0014ddd1"/>
    </style:style>
    <style:style style:name="P4" style:family="paragraph" style:parent-style-name="Standard">
      <style:text-properties officeooo:rsid="0014ddd1" officeooo:paragraph-rsid="0014ddd1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paragraph-rsid="0018aedf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c8ba6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bold" officeooo:rsid="00200a00" officeooo:paragraph-rsid="00200a00" style:font-weight-asian="bold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weight="normal" officeooo:rsid="00200a00" officeooo:paragraph-rsid="00200a00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 officeooo:rsid="00200a00" officeooo:paragraph-rsid="0021c054" style:font-weight-asian="normal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paragraph-rsid="00240e9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24d587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weight="normal" officeooo:rsid="00256292" officeooo:paragraph-rsid="00256292" style:font-weight-asian="normal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weight="normal" officeooo:rsid="00200a00" officeooo:paragraph-rsid="00256292" style:font-weight-asian="normal" style:font-weight-complex="normal"/>
    </style:style>
    <style:style style:name="T1" style:family="text">
      <style:text-properties officeooo:rsid="0014ddd1"/>
    </style:style>
    <style:style style:name="T2" style:family="text">
      <style:text-properties officeooo:rsid="0018aedf"/>
    </style:style>
    <style:style style:name="T3" style:family="text">
      <style:text-properties officeooo:rsid="001bd38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4634"/>
    </style:style>
    <style:style style:name="T6" style:family="text">
      <style:text-properties officeooo:rsid="001c8ba6"/>
    </style:style>
    <style:style style:name="T7" style:family="text">
      <style:text-properties officeooo:rsid="001d0056"/>
    </style:style>
    <style:style style:name="T8" style:family="text">
      <style:text-properties officeooo:rsid="0025e988"/>
    </style:style>
    <style:style style:name="T9" style:family="text">
      <style:text-properties officeooo:rsid="00240e9d"/>
    </style:style>
    <style:style style:name="T10" style:family="text">
      <style:text-properties fo:font-weight="normal" officeooo:rsid="00200a00" style:font-weight-asian="normal" style:font-weight-complex="normal"/>
    </style:style>
    <style:style style:name="T11" style:family="text">
      <style:text-properties fo:font-weight="normal" officeooo:rsid="00234aae" style:font-weight-asian="normal" style:font-weight-complex="normal"/>
    </style:style>
    <style:style style:name="T12" style:family="text">
      <style:text-properties fo:font-weight="normal" officeooo:rsid="00240e9d" style:font-weight-asian="normal" style:font-weight-complex="normal"/>
    </style:style>
    <style:style style:name="T13" style:family="text">
      <style:text-properties officeooo:rsid="0024d587"/>
    </style:style>
    <style:style style:name="T14" style:family="text">
      <style:text-properties officeooo:rsid="00256292"/>
    </style:style>
    <style:style style:name="T15" style:family="text">
      <style:text-properties officeooo:rsid="0025a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мена: Христо Андонов ФН: СИ726</text:p>
      <text:p text:style-name="P1"/>
      <text:p text:style-name="P2">Задача 1:</text:p>
      <text:p text:style-name="P3"><text:span text:style-name="T1">При c=1234, e=13, n=2537 да се намери:<text:line-break/>1) q и p </text:span>√2537 ≈ 50.4, <text:span text:style-name="T1">така че тестваме цели числа до</text:span> 50:</text:p>
      <text:p text:style-name="P3"><text:line-break/><text:span text:style-name="T1">Започваме да обхождаме 2</text:span>, 3, 5, 7, 11, 13, 17, 19, 23, 29, 31, 37, 41, 43...</text:p>
      <text:p text:style-name="P3"/>
      <text:p text:style-name="P4">След известно време стигаме до p=43 и q=59 защото:</text:p>
      <text:p text:style-name="P3">43×59=43×60−43=2580−43=2537</text:p>
      <text:p text:style-name="P3"><text:line-break/><text:line-break/><text:span text:style-name="T2">2) Ойлеровата функция </text:span>ϕ(N)=(p−1)(q−1)=42×58=2436​<text:line-break/><text:line-break/><text:line-break/>3<text:span text:style-name="T3">)</text:span> Алгоритъм на Евклид — намиране на d</text:p>
      <text:p text:style-name="P5">Решаваме: e⋅d≡1(modϕ(N)), тоест 13⋅d≡1(mod2436)</text:p>
      <text:p text:style-name="Text_20_body"><text:span text:style-name="Strong_20_Emphasis"><text:span text:style-name="T4">Разширен алгоритъм на Евклид — стъпки:</text:span></text:span></text:p>
      <text:p text:style-name="P5">2436 = 187×13+5 13 = 2×5+3 5=1×3+2 3 = 1×2+1 2 = 2×1+0⇒gcd = 1<text:line-break/><text:line-break/><text:span text:style-name="Strong_20_Emphasis"><text:span text:style-name="T4">Обратна замяна:</text:span></text:span></text:p>
      <text:p text:style-name="P6">1 = 3−1×2 <text:line-break/>1 = 3−1×(5−1×3) = 2×3−1×5 1=2×(13−2×5)−1×5 = 2×13−5×5 <text:line-break/>1 = 2×13−5×(2436−187×13) = 937×13−5×2436</text:p>
      <text:p text:style-name="P6">d=937​ </text:p>
      <text:p text:style-name="Text_20_body">Проверка: 13 × 937 = 12181 = 5 × 2436 + 1 </text:p>
      <text:p text:style-name="P7"><text:span text:style-name="T5">4) </text:span><text:span text:style-name="T3">Декриптиране,<text:line-break/></text:span><text:span text:style-name="T6">Формулата е: M=C^d*mod(N)<text:line-break/>това ни дава </text:span>M=1234<text:span text:style-name="T6">^</text:span>937<text:span text:style-name="T6">*</text:span>mod<text:span text:style-name="T6">(</text:span>2537<text:span text:style-name="T6">)</text:span>=602<text:line-break/><text:line-break/>Проверка (криптиране): 602<text:span text:style-name="T6">^13*mod(2537)=1234<text:line-break/><text:line-break/>Тоест, p=43, q=59, N=2537, ϕ(N)= 2436, </text:span><text:span text:style-name="T7">e=13, c=1234, d=93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Задача 2:<text:line-break/><text:span text:style-name="T4">Откраднали сте MD5 хеш на 4-цифрен ПИН код. Солта е низът "LAB_", добавен в</text:span></text:p>
      <text:p text:style-name="P9">началото на ПИН-а (напр. "LAB_1234").</text:p>
      <text:p text:style-name="P9">Изтеклият хеш е: 9daae68368ac7be2d9902bb79b556c04</text:p>
      <text:p text:style-name="P9">1. Напишете C програма (с OpenSSL) за Brute-force атака (от 0000 до 9999).</text:p>
      <text:p text:style-name="P9">2. Генерирайте стринговете, изчислете MD5 и сравнете с таргета.</text:p>
      <text:p text:style-name="P9"><draw:frame draw:style-name="fr1" draw:name="Image1" text:anchor-type="char" svg:x="-0.0728in" svg:y="1.0366in" svg:width="6.6929in" svg:height="1.2228in" draw:z-index="0"><draw:image xlink:href="Pictures/10000001000002AC0000007D9949E908.png" xlink:type="simple" xlink:show="embed" xlink:actuate="onLoad" draw:mime-type="image/png"/></draw:frame>3. Отпечатайте разбития ПИН.</text:p>
      <text:p text:style-name="P9">При компилация на кода <text:span text:style-name="T8">на във файла bruteforce_hash.c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Задача 3:</text:p>
      <text:p text:style-name="P10"><text:span text:style-name="T9">1) </text:span>Функция на Ойлер: Какво измерва функцията ϕ(N) и защо е критично важно</text:p>
      <text:p text:style-name="P11"><text:span text:style-name="T10">стойностите на и да се пазят в тайна при създаването на RSA ключ?<text:line-break/><text:line-break/></text:span><text:span text:style-name="T11">Ойлеровата функция ϕ(N)=(q-1)*(p-1) се ползва с цел да се намерят най-големите числата които са естествени, кратни на N и са взаимно прости с него.<text:line-break/><text:line-break/>След това се ползва за това да се намери тайния ключ d чрез формулата </text:span>e⋅d≡1(modϕ(N))<text:span text:style-name="T11"><text:line-break/><text:line-break/>Тоест, голяма част от сигурността на RSA се базира на трудността на фракторизацията от N.</text:span></text:p>
      <text:p text:style-name="P12"><text:span text:style-name="T12">2) Какво значи свойството еднопосочност? <text:line-break/><text:line-break/>Означава че когато хешираме по конкретен начин лесно се изчислява в едната посока, но е напрактика невъзможно да се изчисли в другата.<text:line-break/><text:line-break/>Защо? Защото м</text:span>атематически хеш функцията е <text:span text:style-name="Strong_20_Emphasis"><text:span text:style-name="T4">компресираща функция</text:span></text:span>.</text:p>
      <text:p text:style-name="P12">MD5 например взима вход с произволна дължина и винаги връща 128 бита.</text:p>
      <text:p text:style-name="P12">Безкрайно много входове се "свиват" в краен брой изходи следователно е <text:span text:style-name="Strong_20_Emphasis"><text:span text:style-name="T4">математически невъзможно</text:span></text:span> да знаем кой точно вход е бил използван, без да го търсим с <text:span text:style-name="T13">опит за brute force</text:span>.</text:p>
      <text:p text:style-name="P12"><text:line-break/><text:span text:style-name="T14">3) Какво е честотен анализ и защо цезаровия шифър е уязвим към него?</text:span></text:p>
      <text:p text:style-name="P13">Цезаровия шифър представлява едно обикновенно изместване на буквите с определен брой стъпки.<text:line-break/>Тоест: А Б В Г изместено с 1 стъпка ще е Б В Г Д.</text:p>
      <text:p text:style-name="P14"><text:span text:style-name="T14"><text:line-break/>Което означава че ако знаем оригиналния език на който е криптирано съобщението, примерно Английски език, можем да направим общ анализ за това кои символи най-често се срещат.<text:line-break/><text:line-break/>След което като имаме записани примерно топ 4-5 символа можем да пробваме да изместим със съответния брой стъпки като вадим разтоянието между дадения символ и най-често използваните букви в латинската азбука.<text:line-break/><text:line-break/>Примерно, най-чесно срещаните букви в </text:span><text:span text:style-name="T15">това хипотетично е:<text:line-break/>T, J, K N.<text:line-break/>Като знаем че най-често срещаната буква е “E” можем да намерим потенциалните ключове:<text:line-break/>15, 5, 6, 9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2:44:26.726827360</meta:creation-date>
    <dc:date>2026-05-13T13:35:52.462589317</dc:date>
    <meta:editing-duration>PT51M18S</meta:editing-duration>
    <meta:editing-cycles>17</meta:editing-cycles>
    <meta:generator>LibreOffice/25.8.5.2$Linux_X86_64 LibreOffice_project/580$Build-2</meta:generator>
    <meta:document-statistic meta:table-count="0" meta:image-count="1" meta:object-count="0" meta:page-count="3" meta:paragraph-count="30" meta:word-count="480" meta:character-count="3002" meta:non-whitespace-character-count="2488"/>
  </office:meta>
</office:document-meta>
</file>